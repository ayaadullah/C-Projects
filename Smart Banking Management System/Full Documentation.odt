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0e7a5c"/>
    </style:style>
    <style:style style:name="P2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e7a5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mart Banking Management</text:h>
      <text:h text:style-name="P1" text:outline-level="1"><text:s/>System</text:h>
      <text:h text:style-name="P2" text:outline-level="2">Full Documentation + C++ Source Code</text:h>
      <text:p text:style-name="P24"/>
      <text:h text:style-name="Heading_20_1" text:outline-level="1"><text:s/>1. System Overview</text:h>
      <text:p text:style-name="Text_20_body">The <text:span text:style-name="Strong_20_Emphasis">Smart Banking Management System (SBMS)</text:span> is a console-based C++ application designed to manage basic banking operations efficiently and securely.</text:p>
      <text:p text:style-name="Text_20_body">It allows customers and bank admins to:</text:p>
      <text:list text:style-name="L1">
        <text:list-item>
          <text:p text:style-name="P5">Create bank accounts </text:p>
        </text:list-item>
        <text:list-item>
          <text:p text:style-name="P5">Deposit money </text:p>
        </text:list-item>
        <text:list-item>
          <text:p text:style-name="P5">Withdraw money </text:p>
        </text:list-item>
        <text:list-item>
          <text:p text:style-name="P5">Check balance </text:p>
        </text:list-item>
        <text:list-item>
          <text:p text:style-name="P5">Maintain transaction history </text:p>
        </text:list-item>
        <text:list-item>
          <text:p text:style-name="P4">Generate account reports </text:p>
        </text:list-item>
      </text:list>
      <text:p text:style-name="Text_20_body">The system ensures <text:span text:style-name="Strong_20_Emphasis">data integrity and traceability</text:span> using file handling and object-oriented design.</text:p>
      <text:p text:style-name="Text_20_body"/>
      <text:h text:style-name="Heading_20_1" text:outline-level="1"><text:s/>2. Core Concepts Used</text:h>
      <text:h text:style-name="Heading_20_2" text:outline-level="2">Object-Oriented Programming (OOP)</text:h>
      <text:list text:style-name="L2">
        <text:list-item>
          <text:p text:style-name="P6">Encapsulation: Account, Customer, Transaction, Admin </text:p>
        </text:list-item>
      </text:list>
      <text:h text:style-name="Heading_20_2" text:outline-level="2">Static Members</text:h>
      <text:list text:style-name="L3">
        <text:list-item>
          <text:p text:style-name="P8">Total accounts created </text:p>
        </text:list-item>
        <text:list-item>
          <text:p text:style-name="P7">Total transactions performed </text:p>
        </text:list-item>
      </text:list>
      <text:h text:style-name="Heading_20_2" text:outline-level="2"><text:s/>File Handling</text:h>
      <text:list text:style-name="L4">
        <text:list-item>
          <text:p text:style-name="P10">Account records stored permanently </text:p>
        </text:list-item>
        <text:list-item>
          <text:p text:style-name="P9">Transaction logs saved </text:p>
        </text:list-item>
      </text:list>
      <text:h text:style-name="Heading_20_2" text:outline-level="2"><text:soft-page-break/><text:s/>Composition</text:h>
      <text:list text:style-name="L5">
        <text:list-item>
          <text:p text:style-name="P11">Transaction class stores multiple records per account </text:p>
        </text:list-item>
      </text:list>
      <text:h text:style-name="Heading_20_2" text:outline-level="2"><text:s/>Arrays of Objects</text:h>
      <text:list text:style-name="L6">
        <text:list-item>
          <text:p text:style-name="P12">Used to manage multiple accounts </text:p>
        </text:list-item>
      </text:list>
      <text:h text:style-name="Heading_20_2" text:outline-level="2"><text:s/>Switch Statement</text:h>
      <text:list text:style-name="L7">
        <text:list-item>
          <text:p text:style-name="P13">Menu-driven banking operations </text:p>
        </text:list-item>
      </text:list>
      <text:h text:style-name="Heading_20_1" text:outline-level="1"><text:s/>3. System Architecture</text:h>
      <text:section text:style-name="Sect1" text:name="code-block-viewer">
        <text:p text:style-name="P3">Banking System</text:p>
        <text:p text:style-name="Preformatted_20_Text">│</text:p>
        <text:p text:style-name="Preformatted_20_Text">├── Account Class</text:p>
        <text:p text:style-name="Preformatted_20_Text">│ <text:s text:c="2"/>├── Account Number</text:p>
        <text:p text:style-name="Preformatted_20_Text">│ <text:s text:c="2"/>├── Holder Name</text:p>
        <text:p text:style-name="Preformatted_20_Text">│ <text:s text:c="2"/>├── Balance</text:p>
        <text:p text:style-name="Preformatted_20_Text">│</text:p>
        <text:p text:style-name="Preformatted_20_Text">├── Transaction Class (Composition)</text:p>
        <text:p text:style-name="Preformatted_20_Text">│ <text:s text:c="2"/>├── Deposit / Withdraw History</text:p>
        <text:p text:style-name="Preformatted_20_Text">│</text:p>
        <text:p text:style-name="Preformatted_20_Text">├── Customer Class</text:p>
        <text:p text:style-name="Preformatted_20_Text">│ <text:s text:c="2"/>├── Performs banking operations</text:p>
        <text:p text:style-name="Preformatted_20_Text">│</text:p>
        <text:p text:style-name="Preformatted_20_Text">└── Admin Class</text:p>
        <text:p text:style-name="Preformatted_20_Text"><text:s text:c="4"/>├── System statistics</text:p>
        <text:p text:style-name="Preformatted_20_Text"><text:s text:c="4"/>├── Reports</text:p>
      </text:section>
      <text:p text:style-name="Horizontal_20_Line"/>
      <text:h text:style-name="Heading_20_1" text:outline-level="1">4. Class Descriptions</text:h>
      <text:h text:style-name="Heading_20_2" text:outline-level="2"><text:s/>Account Class</text:h>
      <text:p text:style-name="Text_20_body">Stores core banking details.</text:p>
      <text:h text:style-name="Heading_20_3" text:outline-level="3">Attributes:</text:h>
      <text:list text:style-name="L8">
        <text:list-item>
          <text:p text:style-name="P15">account number </text:p>
        </text:list-item>
        <text:list-item>
          <text:p text:style-name="P15">holder name </text:p>
        </text:list-item>
        <text:list-item>
          <text:p text:style-name="P14">balance </text:p>
        </text:list-item>
      </text:list>
      <text:h text:style-name="Heading_20_3" text:outline-level="3">Functions:</text:h>
      <text:list text:style-name="L9">
        <text:list-item>
          <text:p text:style-name="P17">create account </text:p>
        </text:list-item>
        <text:list-item>
          <text:p text:style-name="P16">display account </text:p>
        </text:list-item>
      </text:list>
      <text:h text:style-name="Heading_20_2" text:outline-level="2"><text:soft-page-break/><text:s/>Transaction Class (Composition)</text:h>
      <text:p text:style-name="Text_20_body">Tracks all financial activity.</text:p>
      <text:h text:style-name="Heading_20_3" text:outline-level="3">Features:</text:h>
      <text:list text:style-name="L10">
        <text:list-item>
          <text:p text:style-name="P19">deposit history </text:p>
        </text:list-item>
        <text:list-item>
          <text:p text:style-name="P19">withdrawal history </text:p>
        </text:list-item>
        <text:list-item>
          <text:p text:style-name="P18">transaction log storage </text:p>
        </text:list-item>
      </text:list>
      <text:h text:style-name="Heading_20_2" text:outline-level="2"><text:s/>Customer Class</text:h>
      <text:p text:style-name="Text_20_body">Handles user-level operations.</text:p>
      <text:h text:style-name="Heading_20_3" text:outline-level="3">Functions:</text:h>
      <text:list text:style-name="L11">
        <text:list-item>
          <text:p text:style-name="P21">deposit money </text:p>
        </text:list-item>
        <text:list-item>
          <text:p text:style-name="P21">withdraw money </text:p>
        </text:list-item>
        <text:list-item>
          <text:p text:style-name="P20">check balance </text:p>
        </text:list-item>
      </text:list>
      <text:h text:style-name="Heading_20_2" text:outline-level="2"><text:s/>Admin Class</text:h>
      <text:p text:style-name="Text_20_body">Monitors system-wide statistics.</text:p>
      <text:h text:style-name="Heading_20_3" text:outline-level="3">Functions:</text:h>
      <text:list text:style-name="L12">
        <text:list-item>
          <text:p text:style-name="P23">view total accounts </text:p>
        </text:list-item>
        <text:list-item>
          <text:p text:style-name="P23">view total transactions </text:p>
        </text:list-item>
        <text:list-item>
          <text:p text:style-name="P22">generate reports </text:p>
        </text:list-item>
      </text:list>
      <text:h text:style-name="Heading_20_1" text:outline-level="1">5. System Features</text:h>
      <text:p text:style-name="Text_20_body"><text:s/>Create new account<text:line-break/> Deposit money<text:line-break/> Withdraw money<text:line-break/> View balance<text:line-break/> Transaction history<text:line-break/> File-based storage<text:line-break/> Admin analytic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02:05:54.172916297</meta:creation-date>
    <dc:date>2026-04-20T02:08:30.257155555</dc:date>
    <meta:editing-duration>PT2M3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75" meta:word-count="274" meta:character-count="1851" meta:non-whitespace-character-count="1615"/>
  </office:meta>
</office:document-meta>
</file>