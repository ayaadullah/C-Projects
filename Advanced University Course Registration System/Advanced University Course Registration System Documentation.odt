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4c6bf"/>
    </style:style>
    <style:style style:name="P2" style:family="paragraph" style:parent-style-name="Preformatted_20_Text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>
      <style:paragraph-properties fo:text-align="center" style:justify-single-word="false"/>
      <style:text-properties officeooo:paragraph-rsid="0004c6bf"/>
    </style:style>
    <style:style style:name="T1" style:family="text">
      <style:text-properties officeooo:rsid="0004c6b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c6bf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officeooo:rsid="0004c6bf" style:font-size-asian="16pt" style:font-size-complex="16pt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officeooo:rsid="0004c6bf" style:font-size-asian="22pt" style:font-size-complex="2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solid" style:text-underline-width="auto" style:text-underline-color="font-color" officeooo:rsid="0004c6bf" style:font-size-asian="24pt" style:font-size-complex="24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8">Point of View Behind t</text:span></text:span><text:span text:style-name="Strong_20_Emphasis"><text:span text:style-name="T9">his real </text:span></text:span></text:h>
      <text:h text:style-name="P1" text:outline-level="1"><text:span text:style-name="Strong_20_Emphasis"><text:span text:style-name="T9">world project</text:span></text:span></text:h>
      <text:p text:style-name="P13"><text:span text:style-name="Strong_20_Emphasis"/></text:p>
      <text:p text:style-name="P13"><text:span text:style-name="Strong_20_Emphasis"/></text:p>
      <text:p text:style-name="Text_20_body">This is not just coding—it’s about <text:span text:style-name="Strong_20_Emphasis">simulating a real-world system</text:span> using OOP.</text:p>
      <text:p text:style-name="Text_20_body">Think of it like this:</text:p>
      <text:h text:style-name="Heading_20_2" text:outline-level="2">Real System → Program Design</text:h>
      <text:p text:style-name="Text_20_body">A university system has:</text:p>
      <text:list text:style-name="L1">
        <text:list-item>
          <text:p text:style-name="P4">Students 👨‍🎓 </text:p>
        </text:list-item>
        <text:list-item>
          <text:p text:style-name="P4">Courses 📚 </text:p>
        </text:list-item>
        <text:list-item>
          <text:p text:style-name="P4">Registrations 📝 </text:p>
        </text:list-item>
        <text:list-item>
          <text:p text:style-name="P3">Admin 👨‍💼 </text:p>
        </text:list-item>
      </text:list>
      <text:p text:style-name="Text_20_body"><text:s/>Instead of writing one big messy program, we <text:span text:style-name="Strong_20_Emphasis">divide responsibilities into classes</text:span>.</text:p>
      <text:h text:style-name="Heading_20_2" text:outline-level="2"><text:s/><text:span text:style-name="Strong_20_Emphasis">Why Each Concept is Used</text:span></text:h>
      <text:h text:style-name="Heading_20_3" text:outline-level="3">1. <text:span text:style-name="Strong_20_Emphasis">Encapsulation (Core Idea)</text:span></text:h>
      <text:p text:style-name="Text_20_body">Each class handles its own data:</text:p>
      <text:list text:style-name="L2">
        <text:list-item>
          <text:p text:style-name="P6"><text:span text:style-name="Source_20_Text">Course</text:span> → course info </text:p>
        </text:list-item>
        <text:list-item>
          <text:p text:style-name="P6"><text:span text:style-name="Source_20_Text">Student</text:span> → student actions </text:p>
        </text:list-item>
        <text:list-item>
          <text:p text:style-name="P6"><text:span text:style-name="Source_20_Text">Registration</text:span> → selected courses </text:p>
        </text:list-item>
        <text:list-item>
          <text:p text:style-name="P5"><text:span text:style-name="Source_20_Text">Admin</text:span> → management </text:p>
        </text:list-item>
      </text:list>
      <text:p text:style-name="Text_20_body"><text:s/>This keeps code <text:span text:style-name="Strong_20_Emphasis">organized + secure</text:span></text:p>
      <text:p text:style-name="Text_20_body"><text:span text:style-name="Strong_20_Emphasis"/></text:p>
      <text:h text:style-name="Heading_20_3" text:outline-level="3">2. <text:span text:style-name="Strong_20_Emphasis">Composition (Very Important)</text:span></text:h>
      <text:p text:style-name="Quotations">“Registration HAS Courses”</text:p>
      <text:list text:style-name="L3">
        <text:list-item>
          <text:p text:style-name="P8">A student can select <text:span text:style-name="Strong_20_Emphasis">multiple courses</text:span> </text:p>
        </text:list-item>
        <text:list-item>
          <text:p text:style-name="P7">So inside <text:span text:style-name="Source_20_Text">Registration</text:span> → we store <text:span text:style-name="Strong_20_Emphasis">array of Course objects</text:span> </text:p>
        </text:list-item>
      </text:list>
      <text:p text:style-name="Text_20_body"/>
      <text:p text:style-name="Text_20_body"/>
      <text:p text:style-name="Text_20_body"><text:soft-page-break/></text:p>
      <text:section text:style-name="Sect1" text:name="code-block-viewer">
        <text:p text:style-name="P2">Course courses[5];</text:p>
      </text:section>
      <text:p text:style-name="Text_20_body">This is called <text:span text:style-name="Strong_20_Emphasis">composition (has-a relationship)</text:span></text:p>
      <text:p text:style-name="Horizontal_20_Line"/>
      <text:h text:style-name="Heading_20_3" text:outline-level="3">3. <text:span text:style-name="Strong_20_Emphasis">Static Members</text:span></text:h>
      <text:p text:style-name="Text_20_body">Used for <text:span text:style-name="Strong_20_Emphasis">shared data across all objects</text:span></text:p>
      <text:p text:style-name="Text_20_body">Example:</text:p>
      <text:section text:style-name="Sect1" text:name="Section1">
        <text:p text:style-name="P2"><text:bookmark text:name="code-block-viewer"/>static int totalStudents;</text:p>
      </text:section>
      <text:p text:style-name="Text_20_body">One value for entire system (not per object)</text:p>
      <text:p text:style-name="Horizontal_20_Line"/>
      <text:h text:style-name="Heading_20_3" text:outline-level="3">4. <text:span text:style-name="Strong_20_Emphasis">File Handling</text:span></text:h>
      <text:p text:style-name="Text_20_body">Why?</text:p>
      <text:list text:style-name="L4">
        <text:list-item>
          <text:p text:style-name="P10">Data should not disappear after program ends </text:p>
        </text:list-item>
        <text:list-item>
          <text:p text:style-name="P10">Save: </text:p>
          <text:list>
            <text:list-item>
              <text:p text:style-name="P10">registrations </text:p>
            </text:list-item>
            <text:list-item>
              <text:p text:style-name="P9">reports </text:p>
            </text:list-item>
          </text:list>
        </text:list-item>
      </text:list>
      <text:p text:style-name="Horizontal_20_Line"/>
      <text:h text:style-name="Heading_20_3" text:outline-level="3">5. <text:span text:style-name="Strong_20_Emphasis">Switch Statement</text:span></text:h>
      <text:p text:style-name="Text_20_body">Used for <text:span text:style-name="Strong_20_Emphasis">menu navigation</text:span></text:p>
      <text:p text:style-name="Text_20_body">Example:</text:p>
      <text:section text:style-name="Sect1" text:name="Section2">
        <text:p text:style-name="P2"><text:bookmark text:name="code-block-viewer Copy 1"/>1. View Courses</text:p>
        <text:p text:style-name="Preformatted_20_Text">2. Register</text:p>
        <text:p text:style-name="Preformatted_20_Text">3. Drop Course</text:p>
        <text:p text:style-name="Preformatted_20_Text">4. Exit</text:p>
      </text:section>
      <text:p text:style-name="Text_20_body"><text:s/>Makes program interactive</text:p>
      <text:h text:style-name="Heading_20_3" text:outline-level="3">6. <text:span text:style-name="Strong_20_Emphasis">Constructors</text:span></text:h>
      <text:p text:style-name="Text_20_body">Used to:</text:p>
      <text:list text:style-name="L5">
        <text:list-item>
          <text:p text:style-name="P12">Initialize objects easily </text:p>
        </text:list-item>
        <text:list-item>
          <text:p text:style-name="P11">Avoid uninitialized garbage valu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01:13:09.448642946</meta:creation-date>
    <dc:date>2026-04-20T01:16:11.245370110</dc:date>
    <meta:editing-duration>PT3M4S</meta:editing-duration>
    <meta:editing-cycles>1</meta:editing-cycles>
    <meta:document-statistic meta:table-count="0" meta:image-count="0" meta:object-count="0" meta:page-count="2" meta:paragraph-count="48" meta:word-count="206" meta:character-count="1207" meta:non-whitespace-character-count="1046"/>
    <meta:generator>LibreOffice/24.2.7.2$Linux_X86_64 LibreOffice_project/420$Build-2</meta:generator>
  </office:meta>
</office:document-meta>
</file>