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 officeooo:paragraph-rsid="00074776"/>
    </style:style>
    <style:style style:name="P2" style:family="paragraph" style:parent-style-name="Heading_20_2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Preformatted_20_Text">
      <style:paragraph-properties fo:margin-left="0in" fo:margin-right="0in" fo:text-indent="0in" style:auto-text-indent="false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in" fo:margin-bottom="0in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in" fo:margin-bottom="0in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paragraph-properties fo:margin-top="0in" fo:margin-bottom="0in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mart Hospital Patient Management </text:h>
      <text:h text:style-name="P1" text:outline-level="1">System</text:h>
      <text:h text:style-name="P2" text:outline-level="2">Full Documentation + C++ Source Code</text:h>
      <text:h text:style-name="Heading_20_1" text:outline-level="1">1. System Overview</text:h>
      <text:p text:style-name="Text_20_body">The <text:span text:style-name="Strong_20_Emphasis">Smart Hospital Patient Management System (SH-PMS)</text:span> is a console-based C++ application designed to efficiently manage hospital operations related to patient care.</text:p>
      <text:p text:style-name="Text_20_body">It allows hospital staff (doctors/admin) to:</text:p>
      <text:list text:style-name="L1">
        <text:list-item>
          <text:p text:style-name="P5">Register new patients </text:p>
        </text:list-item>
        <text:list-item>
          <text:p text:style-name="P5">Update medical records </text:p>
        </text:list-item>
        <text:list-item>
          <text:p text:style-name="P5">View patient history </text:p>
        </text:list-item>
        <text:list-item>
          <text:p text:style-name="P5">Track active cases </text:p>
        </text:list-item>
        <text:list-item>
          <text:p text:style-name="P5">Discharge patients </text:p>
        </text:list-item>
        <text:list-item>
          <text:p text:style-name="P4">Generate hospital reports </text:p>
        </text:list-item>
      </text:list>
      <text:p text:style-name="Text_20_body">The system is built using <text:span text:style-name="Strong_20_Emphasis">Object-Oriented Programming (OOP)</text:span> principles with file handling for persistent storage.</text:p>
      <text:h text:style-name="Heading_20_1" text:outline-level="1">2. Core Concepts Used</text:h>
      <text:h text:style-name="Heading_20_2" text:outline-level="2">Object-Oriented Programming (OOP)</text:h>
      <text:list text:style-name="L2">
        <text:list-item>
          <text:p text:style-name="P7">Encapsulation (private data + public methods) </text:p>
        </text:list-item>
        <text:list-item>
          <text:p text:style-name="P6">Classes: Patient, Doctor, Record, Admin </text:p>
        </text:list-item>
      </text:list>
      <text:h text:style-name="Heading_20_2" text:outline-level="2"><text:s/>Static Members</text:h>
      <text:list text:style-name="L3">
        <text:list-item>
          <text:p text:style-name="P9">Total patients admitted </text:p>
        </text:list-item>
        <text:list-item>
          <text:p text:style-name="P8">Total active patients </text:p>
        </text:list-item>
      </text:list>
      <text:h text:style-name="Heading_20_2" text:outline-level="2">File Handling</text:h>
      <text:list text:style-name="L4">
        <text:list-item>
          <text:p text:style-name="P11">Patient records stored in files </text:p>
        </text:list-item>
        <text:list-item>
          <text:p text:style-name="P10">Discharge reports saved permanently </text:p>
        </text:list-item>
      </text:list>
      <text:h text:style-name="Heading_20_2" text:outline-level="2"><text:soft-page-break/>Composition</text:h>
      <text:list text:style-name="L5">
        <text:list-item>
          <text:p text:style-name="P12"><text:span text:style-name="Source_20_Text">Record</text:span> class contains multiple <text:span text:style-name="Source_20_Text">Patient</text:span> objects (medical history) </text:p>
        </text:list-item>
      </text:list>
      <text:h text:style-name="Heading_20_2" text:outline-level="2">Arrays of Objects</text:h>
      <text:list text:style-name="L6">
        <text:list-item>
          <text:p text:style-name="P13">Used to manage multiple patients </text:p>
        </text:list-item>
      </text:list>
      <text:h text:style-name="Heading_20_2" text:outline-level="2">Switch Statement</text:h>
      <text:list text:style-name="L7">
        <text:list-item>
          <text:p text:style-name="P14">Menu-driven system navigation </text:p>
          <text:p text:style-name="P14"/>
        </text:list-item>
      </text:list>
      <text:h text:style-name="Heading_20_1" text:outline-level="1"><text:s/>3. System Architecture</text:h>
      <text:section text:style-name="Sect1" text:name="code-block-viewer">
        <text:p text:style-name="P3">Hospital System</text:p>
        <text:p text:style-name="Preformatted_20_Text">│</text:p>
        <text:p text:style-name="Preformatted_20_Text">├── Patient Class</text:p>
        <text:p text:style-name="Preformatted_20_Text">│ <text:s text:c="2"/>├── Name</text:p>
        <text:p text:style-name="Preformatted_20_Text">│ <text:s text:c="2"/>├── Age</text:p>
        <text:p text:style-name="Preformatted_20_Text">│ <text:s text:c="2"/>├── Disease</text:p>
        <text:p text:style-name="Preformatted_20_Text">│ <text:s text:c="2"/>└── Status</text:p>
        <text:p text:style-name="Preformatted_20_Text">│</text:p>
        <text:p text:style-name="Preformatted_20_Text">├── Record Class</text:p>
        <text:p text:style-name="Preformatted_20_Text">│ <text:s text:c="2"/>├── Patient History (Composition)</text:p>
        <text:p text:style-name="Preformatted_20_Text">│</text:p>
        <text:p text:style-name="Preformatted_20_Text">├── Doctor Class</text:p>
        <text:p text:style-name="Preformatted_20_Text">│ <text:s text:c="2"/>├── Diagnose / Update patient</text:p>
        <text:p text:style-name="Preformatted_20_Text">│</text:p>
        <text:p text:style-name="Preformatted_20_Text">└── Admin Class</text:p>
        <text:p text:style-name="Preformatted_20_Text"><text:s text:c="4"/>├── Statistics</text:p>
        <text:p text:style-name="Preformatted_20_Text"><text:s text:c="4"/>├── Reports</text:p>
      </text:section>
      <text:p text:style-name="Horizontal_20_Line"/>
      <text:h text:style-name="Heading_20_1" text:outline-level="1"><text:s/>4. Class Descriptions</text:h>
      <text:h text:style-name="Heading_20_2" text:outline-level="2"><text:s/>Patient Class</text:h>
      <text:p text:style-name="Text_20_body">Stores all patient-related data.</text:p>
      <text:h text:style-name="Heading_20_3" text:outline-level="3">Attributes:</text:h>
      <text:list text:style-name="L8">
        <text:list-item>
          <text:p text:style-name="P16">name </text:p>
        </text:list-item>
        <text:list-item>
          <text:p text:style-name="P16">age </text:p>
        </text:list-item>
        <text:list-item>
          <text:p text:style-name="P16">disease </text:p>
        </text:list-item>
        <text:list-item>
          <text:p text:style-name="P15">status (admitted/discharged) </text:p>
        </text:list-item>
      </text:list>
      <text:h text:style-name="Heading_20_3" text:outline-level="3"><text:soft-page-break/>Functions:</text:h>
      <text:list text:style-name="L9">
        <text:list-item>
          <text:p text:style-name="P18">addPatient() </text:p>
        </text:list-item>
        <text:list-item>
          <text:p text:style-name="P18">updateInfo() </text:p>
        </text:list-item>
        <text:list-item>
          <text:p text:style-name="P17">display() </text:p>
        </text:list-item>
      </text:list>
      <text:p text:style-name="Text_20_body"/>
      <text:h text:style-name="Heading_20_2" text:outline-level="2">Record Class (Composition)</text:h>
      <text:p text:style-name="Text_20_body">Manages patient history.</text:p>
      <text:h text:style-name="Heading_20_3" text:outline-level="3">Features:</text:h>
      <text:list text:style-name="L10">
        <text:list-item>
          <text:p text:style-name="P20">Stores multiple Patient objects </text:p>
        </text:list-item>
        <text:list-item>
          <text:p text:style-name="P19">Maintains medical history </text:p>
        </text:list-item>
      </text:list>
      <text:p text:style-name="Text_20_body"/>
      <text:h text:style-name="Heading_20_2" text:outline-level="2"><text:s/>Doctor Class</text:h>
      <text:p text:style-name="Text_20_body">Responsible for medical updates.</text:p>
      <text:h text:style-name="Heading_20_3" text:outline-level="3">Functions:</text:h>
      <text:list text:style-name="L11">
        <text:list-item>
          <text:p text:style-name="P22">diagnosePatient() </text:p>
        </text:list-item>
        <text:list-item>
          <text:p text:style-name="P21">updateTreatment() </text:p>
        </text:list-item>
      </text:list>
      <text:p text:style-name="Text_20_body"/>
      <text:h text:style-name="Heading_20_2" text:outline-level="2"><text:s/>Admin Class</text:h>
      <text:p text:style-name="Text_20_body">Handles hospital analytics.</text:p>
      <text:h text:style-name="Heading_20_3" text:outline-level="3">Functions:</text:h>
      <text:list text:style-name="L12">
        <text:list-item>
          <text:p text:style-name="P24">showStats() </text:p>
        </text:list-item>
        <text:list-item>
          <text:p text:style-name="P23">generateReports() </text:p>
        </text:list-item>
      </text:list>
      <text:h text:style-name="Heading_20_1" text:outline-level="1">5. System Features</text:h>
      <text:p text:style-name="Text_20_body"><text:s text:c="7"/>Add new patient<text:line-break/> <text:s text:c="6"/>Update patient record<text:line-break/> <text:s text:c="6"/>View patient history<text:line-break/> <text:s text:c="6"/>Discharge patient<text:line-break/> <text:s text:c="6"/>Save records to file<text:line-break/> <text:s text:c="5"/>Generate hospital stats</text:p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0T01:58:49.992705298</meta:creation-date>
    <dc:date>2026-04-20T02:03:16.316172846</dc:date>
    <meta:editing-duration>PT4M27S</meta:editing-duration>
    <meta:editing-cycles>1</meta:editing-cycles>
    <meta:document-statistic meta:table-count="0" meta:image-count="0" meta:object-count="0" meta:page-count="4" meta:paragraph-count="77" meta:word-count="281" meta:character-count="1927" meta:non-whitespace-character-count="1655"/>
    <meta:generator>LibreOffice/24.2.7.2$Linux_X86_64 LibreOffice_project/420$Build-2</meta:generator>
  </office:meta>
</office:document-meta>
</file>